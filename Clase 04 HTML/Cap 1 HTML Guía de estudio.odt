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251cm"/>
    </style:style>
    <style:style style:name="Tabla1.B" style:family="table-column">
      <style:table-column-properties style:column-width="14.75cm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a1.A1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Heading_20_1">
      <style:text-properties style:font-name="Verdana" fo:font-size="12pt" style:font-size-asian="12pt" style:font-size-complex="12pt"/>
    </style:style>
    <style:style style:name="P2" style:family="paragraph" style:parent-style-name="Text_20_body">
      <style:text-properties style:font-name="Verdana" fo:font-size="11pt" style:font-size-asian="11pt" style:font-size-complex="11pt"/>
    </style:style>
    <style:style style:name="P3" style:family="paragraph" style:parent-style-name="Heading_20_2">
      <style:text-properties style:font-name="Verdana" fo:font-size="11pt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Verdana" fo:font-size="11pt" fo:font-weight="bold" style:font-size-asian="11pt" style:font-size-complex="11pt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Verdana" fo:font-size="11pt" style:font-size-asian="11pt" style:font-size-complex="11pt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Verdana" fo:font-size="11pt" style:font-size-asian="11pt" style:font-size-complex="11pt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able_20_Contents">
      <style:paragraph-properties fo:margin-top="0cm" fo:margin-bottom="0.499cm" style:contextual-spacing="false"/>
      <style:text-properties style:font-name="Verdana" fo:font-size="11pt" style:font-size-asian="11pt" style:font-size-complex="11pt"/>
    </style:style>
    <style:style style:name="P14" style:family="paragraph" style:parent-style-name="Table_20_Contents">
      <style:paragraph-properties fo:margin-top="0cm" fo:margin-bottom="0.499cm" style:contextual-spacing="false"/>
      <style:text-properties style:font-name="Verdana" fo:font-size="11pt" fo:font-weight="bold" style:font-size-asian="11pt" style:font-size-complex="11pt"/>
    </style:style>
    <style:style style:name="P15" style:family="paragraph" style:parent-style-name="Table_20_Contents">
      <style:paragraph-properties fo:margin-top="0cm" fo:margin-bottom="0.499cm" style:contextual-spacing="false"/>
    </style:style>
    <style:style style:name="P16" style:family="paragraph" style:parent-style-name="Standard">
      <style:text-properties style:font-name="Verdana" fo:font-size="11pt" style:font-size-asian="11pt" style:font-size-complex="11pt"/>
    </style:style>
    <style:style style:name="T1" style:family="text">
      <style:text-properties style:font-name="Verdana" fo:font-size="11pt" fo:font-weight="bold" style:font-size-asian="11pt" style:font-size-complex="11pt"/>
    </style:style>
    <style:style style:name="T2" style:family="text">
      <style:text-properties style:font-name="Verdana" fo:font-size="11pt" style:font-size-asian="11pt" style:font-size-complex="11pt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ía de Estudio: Introducción a HTML5 y la Estructura de Documentos</text:h>
      <text:p text:style-name="P2">Esta guía de estudio proporciona una revisión profunda de los conceptos fundamentales de HTML5, su evolución histórica y la implementación de su estructura semántica, basada en los materiales de "El gran libro de HTML5, CSS3 y Javascript".</text:p>
      <text:p text:style-name="P2">-------------------------------------------------------------------------------- </text:p>
      <text:h text:style-name="P3" text:outline-level="2">Cuestionario de Repaso</text:h>
      <text:p text:style-name="P2">Responda a las siguientes preguntas de manera concisa (2 a 3 oraciones por respuesta).</text:p>
      <text:list text:style-name="L1">
        <text:list-item>
          <text:p text:style-name="P4">¿Qué define a HTML5 como un "nuevo concepto" en comparación con las versiones anteriores de HTML?</text:p>
        </text:list-item>
        <text:list-item>
          <text:p text:style-name="P4">¿Cuál fue el principal inconveniente técnico de tecnologías como Java y Flash según el texto?</text:p>
        </text:list-item>
        <text:list-item>
          <text:p text:style-name="P4">¿Cómo se dividen las responsabilidades entre HTML, CSS y Javascript en el desarrollo moderno?</text:p>
        </text:list-item>
        <text:list-item>
          <text:p text:style-name="P5"><text:span text:style-name="T1">¿Cuál es la función del elemento </text:span><text:span text:style-name="Source_20_Text"><text:span text:style-name="T1">&lt;!DOCTYPE html&gt;</text:span></text:span><text:span text:style-name="T2"> </text:span><text:span text:style-name="T1">y dónde debe ubicarse?</text:span></text:p>
        </text:list-item>
        <text:list-item>
          <text:p text:style-name="P5"><text:span text:style-name="T1">¿Para qué sirve el atributo </text:span><text:span text:style-name="Source_20_Text"><text:span text:style-name="T1">lang</text:span></text:span><text:span text:style-name="T2"> </text:span><text:span text:style-name="T1">en la etiqueta </text:span><text:span text:style-name="Source_20_Text"><text:span text:style-name="T1">&lt;html&gt;</text:span></text:span><text:span text:style-name="T1">?</text:span></text:p>
        </text:list-item>
        <text:list-item>
          <text:p text:style-name="P5"><text:span text:style-name="T1">¿Qué diferencia existe entre el alcance de las etiquetas </text:span><text:span text:style-name="Source_20_Text"><text:span text:style-name="T1">&lt;head&gt;</text:span></text:span><text:span text:style-name="T2"> </text:span><text:span text:style-name="T1">y </text:span><text:span text:style-name="Source_20_Text"><text:span text:style-name="T1">&lt;header&gt;</text:span></text:span><text:span text:style-name="T1">?</text:span></text:p>
        </text:list-item>
        <text:list-item>
          <text:p text:style-name="P5"><text:span text:style-name="T1">¿Cuál es el propósito del elemento </text:span><text:span text:style-name="Source_20_Text"><text:span text:style-name="T1">&lt;nav&gt;</text:span></text:span><text:span text:style-name="T2"> </text:span><text:span text:style-name="T1">y qué tipo de enlaces debe contener?</text:span></text:p>
        </text:list-item>
        <text:list-item>
          <text:p text:style-name="P5"><text:span text:style-name="T1">¿En qué situaciones es apropiado utilizar el elemento </text:span><text:span text:style-name="Source_20_Text"><text:span text:style-name="T1">&lt;aside&gt;</text:span></text:span><text:span text:style-name="T1">?</text:span></text:p>
        </text:list-item>
        <text:list-item>
          <text:p text:style-name="P4">¿Cómo define el texto la relación de "padres, hijos y hermanos" en un documento HTML?</text:p>
        </text:list-item>
        <text:list-item>
          <text:p text:style-name="P6"><text:span text:style-name="T1">¿Para qué se utiliza el elemento </text:span><text:span text:style-name="Source_20_Text"><text:span text:style-name="T1">&lt;hgroup&gt;</text:span></text:span><text:span text:style-name="T2"> </text:span><text:span text:style-name="T1">y qué restricciones tiene sobre su contenido?</text:span></text:p>
        </text:list-item>
      </text:list>
      <text:p text:style-name="P2">-------------------------------------------------------------------------------- </text:p>
      <text:h text:style-name="P3" text:outline-level="2">Clave de Respuestas</text:h>
      <text:list text:style-name="L2">
        <text:list-item>
          <text:p text:style-name="P7">HTML5 no es solo una mejora, sino un concepto para la construcción de sitios y aplicaciones en una era de dispositivos móviles, computación en la nube y trabajos en red. Propone estándares para cada aspecto de la web y une estructuralmente HTML, CSS y Javascript.</text:p>
        </text:list-item>
        <text:list-item>
          <text:p text:style-name="P7">Su mayor inconveniente fue la falta de integración, ya que fueron concebidos como complementos (<text:span text:style-name="T3">plug-ins</text:span>) que compartían espacio en pantalla pero no se comunicaban con el documento. Esta limitación aislaba el contenido y restringía el alcance de las aplicaciones.</text:p>
        </text:list-item>
        <text:list-item>
          <text:p text:style-name="P7">HTML provee los elementos estructurales del documento, CSS se encarga de que esa estructura sea utilizable y atractiva visualmente, y Javascript aporta el dinamismo necesario para construir aplicaciones funcionales. Estas tres tecnologías actúan como una unidad bajo la especificación de HTML5.</text:p>
        </text:list-item>
        <text:list-item>
          <text:p text:style-name="P7"><text:soft-page-break/>Este elemento indica el tipo de documento que se está creando para que el navegador active el modo estándar e interprete las funciones de HTML5. Debe ser la primera línea del archivo, sin espacios ni líneas que la precedan.</text:p>
        </text:list-item>
        <text:list-item>
          <text:p text:style-name="P8"><text:span text:style-name="T2">El atributo </text:span><text:span text:style-name="Source_20_Text"><text:span text:style-name="T2">lang</text:span></text:span><text:span text:style-name="T2"> define el idioma humano del contenido del documento (por ejemplo, "es" para español). Aunque HTML5 es flexible y permite ignorarlo, su uso es una práctica recomendada para preservar la compatibilidad.</text:span></text:p>
        </text:list-item>
        <text:list-item>
          <text:p text:style-name="P8"><text:span text:style-name="T2">El elemento </text:span><text:span text:style-name="Source_20_Text"><text:span text:style-name="T2">&lt;head&gt;</text:span></text:span><text:span text:style-name="T2"> provee información general sobre todo el documento (como metadatos y títulos de ventana), siendo invisible para el usuario. Por el contrario, </text:span><text:span text:style-name="Source_20_Text"><text:span text:style-name="T2">&lt;header&gt;</text:span></text:span><text:span text:style-name="T2"> se usa dentro del cuerpo para proporcionar información introductoria visible, como títulos o logos, de una sección específica o del cuerpo mismo.</text:span></text:p>
        </text:list-item>
        <text:list-item>
          <text:p text:style-name="P8"><text:span text:style-name="T2">El elemento </text:span><text:span text:style-name="Source_20_Text"><text:span text:style-name="T2">&lt;nav&gt;</text:span></text:span><text:span text:style-name="T2"> se utiliza para identificar una sección que contiene enlaces de navegación, como menús o índices principales. No todos los enlaces del sitio deben estar dentro de un </text:span><text:span text:style-name="Source_20_Text"><text:span text:style-name="T2">&lt;nav&gt;</text:span></text:span><text:span text:style-name="T2">, sino solo aquellos que formen bloques de navegación significativos.</text:span></text:p>
        </text:list-item>
        <text:list-item>
          <text:p text:style-name="P8"><text:span text:style-name="T2">El elemento </text:span><text:span text:style-name="Source_20_Text"><text:span text:style-name="T2">&lt;aside&gt;</text:span></text:span><text:span text:style-name="T2"> representa contenido relacionado con la información principal pero que no es esencial para el flujo del documento, como citas, barras laterales o publicidad. Puede ubicarse en cualquier parte del diseño, ya que describe el tipo de contenido y no su posición física.</text:span></text:p>
        </text:list-item>
        <text:list-item>
          <text:p text:style-name="P7">Esta terminología describe la estructura de árbol del lenguaje, donde un elemento que contiene a otro es el "padre" y el elemento contenido es el "hijo". Los elementos que comparten el mismo nivel dentro de un padre común se denominan "hermanos".</text:p>
        </text:list-item>
        <text:list-item>
          <text:p text:style-name="P9"><text:span text:style-name="T2">Se utiliza para agrupar etiquetas de cabecera (</text:span><text:span text:style-name="Source_20_Text"><text:span text:style-name="T2">&lt;h1&gt;</text:span></text:span><text:span text:style-name="T2"> a </text:span><text:span text:style-name="Source_20_Text"><text:span text:style-name="T2">&lt;h6&gt;</text:span></text:span><text:span text:style-name="T2">) cuando una sección tiene múltiples niveles, como un título y un subtítulo. Su restricción principal es que solo puede contener etiquetas de la familia H.</text:span></text:p>
        </text:list-item>
      </text:list>
      <text:p text:style-name="P2">-------------------------------------------------------------------------------- </text:p>
      <text:h text:style-name="P3" text:outline-level="2">Temas para Ensayo</text:h>
      <text:p text:style-name="P2">Las siguientes preguntas están diseñadas para fomentar una reflexión profunda sobre la evolución y la semántica de la web.</text:p>
      <text:list text:style-name="L3">
        <text:list-item>
          <text:p text:style-name="P10"><text:span text:style-name="T4">La transición de la Web 1.0 a la Web 2.0:</text:span> Analice cómo la evolución de los intérpretes de Javascript en los navegadores permitió superar las limitaciones de los <text:span text:style-name="T3">plug-ins</text:span> tradicionales y transformó la percepción de este lenguaje en la comunidad de programadores.</text:p>
        </text:list-item>
        <text:list-item>
          <text:p text:style-name="P11"><text:span text:style-name="T1">Semántica vs. Presentación:</text:span><text:span text:style-name="T2"> Explique por qué HTML5 prioriza la identificación del propósito de una sección (uso de etiquetas como </text:span><text:span text:style-name="Source_20_Text"><text:span text:style-name="T2">&lt;article&gt;</text:span></text:span><text:span text:style-name="T2"> o </text:span><text:span text:style-name="Source_20_Text"><text:span text:style-name="T2">&lt;section&gt;</text:span></text:span><text:span text:style-name="T2">) sobre su apariencia visual, y cómo esta distinción beneficia a los navegadores y dispositivos modernos.</text:span></text:p>
        </text:list-item>
        <text:list-item>
          <text:p text:style-name="P11"><text:span text:style-name="T1">La versatilidad de los elementos estructurales:</text:span><text:span text:style-name="T2"> Discuta la capacidad de elementos como </text:span><text:span text:style-name="Source_20_Text"><text:span text:style-name="T2">&lt;header&gt;</text:span></text:span><text:span text:style-name="T2">, </text:span><text:span text:style-name="Source_20_Text"><text:span text:style-name="T2">&lt;footer&gt;</text:span></text:span><text:span text:style-name="T2"> y </text:span><text:span text:style-name="Source_20_Text"><text:span text:style-name="T2">&lt;address&gt;</text:span></text:span><text:span text:style-name="T2"> para ser reutilizados en diferentes niveles del documento (tanto en el cuerpo global como dentro de un </text:span><text:span text:style-name="Source_20_Text"><text:span text:style-name="T2">&lt;article&gt;</text:span></text:span><text:span text:style-name="T2">).</text:span></text:p>
        </text:list-item>
        <text:list-item>
          <text:p text:style-name="P10"><text:span text:style-name="T4">La importancia de la estructura tipo árbol:</text:span> Describa cómo la organización jerárquica de etiquetas influye en la interpretación del documento por parte del <text:soft-page-break/>navegador y por qué es vital mantener la flexibilidad y fortaleza de estos fundamentos.</text:p>
        </text:list-item>
        <text:list-item>
          <text:p text:style-name="P12"><text:span text:style-name="T1">Redefinición de elementos antiguos:</text:span><text:span text:style-name="T2"> Evalúe el cambio de propósito de etiquetas como </text:span><text:span text:style-name="Source_20_Text"><text:span text:style-name="T2">&lt;small&gt;</text:span></text:span><text:span text:style-name="T2">, </text:span><text:span text:style-name="Source_20_Text"><text:span text:style-name="T2">&lt;cite&gt;</text:span></text:span><text:span text:style-name="T2"> y </text:span><text:span text:style-name="Source_20_Text"><text:span text:style-name="T2">&lt;b&gt;</text:span></text:span><text:span text:style-name="T2"> en HTML5, pasando de ser etiquetas de estilo visual a etiquetas con un significado semántico específico.</text:span></text:p>
        </text:list-item>
      </text:list>
      <text:p text:style-name="P2">-------------------------------------------------------------------------------- </text:p>
      <text:h text:style-name="P3" text:outline-level="2">Glosario de Términos Clave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Término</text:p>
          </table:table-cell>
          <table:table-cell table:style-name="Tabla1.B1" office:value-type="string">
            <text:p text:style-name="P13">Definición</text:p>
          </table:table-cell>
        </table:table-row>
        <table:table-row>
          <table:table-cell table:style-name="Tabla1.A2" office:value-type="string">
            <text:p text:style-name="P14">API</text:p>
          </table:table-cell>
          <table:table-cell table:style-name="Tabla1.B2" office:value-type="string">
            <text:p text:style-name="P13">Interfaz de Programación de Aplicaciones; conjunto de reglas que permiten la integración de funcionalidades en HTML5.</text:p>
          </table:table-cell>
        </table:table-row>
        <table:table-row>
          <table:table-cell table:style-name="Tabla1.A2" office:value-type="string">
            <text:p text:style-name="P14">Article</text:p>
          </table:table-cell>
          <table:table-cell table:style-name="Tabla1.B2" office:value-type="string">
            <text:p text:style-name="P13">Elemento que representa una porción independiente y autónoma de información relevante, como una entrada de blog o un comentario.</text:p>
          </table:table-cell>
        </table:table-row>
        <table:table-row>
          <table:table-cell table:style-name="Tabla1.A2" office:value-type="string">
            <text:p text:style-name="P14">Aside</text:p>
          </table:table-cell>
          <table:table-cell table:style-name="Tabla1.B2" office:value-type="string">
            <text:p text:style-name="P13">Sección que contiene contenido secundario o de apoyo relacionado con el tema principal, usualmente visualizado como barra lateral.</text:p>
          </table:table-cell>
        </table:table-row>
        <table:table-row>
          <table:table-cell table:style-name="Tabla1.A2" office:value-type="string">
            <text:p text:style-name="P14">CSS3</text:p>
          </table:table-cell>
          <table:table-cell table:style-name="Tabla1.B2" office:value-type="string">
            <text:p text:style-name="P13">Especificación utilizada para aplicar estilos, formato y presentación visual a la estructura definida en HTML.</text:p>
          </table:table-cell>
        </table:table-row>
        <table:table-row>
          <table:table-cell table:style-name="Tabla1.A2" office:value-type="string">
            <text:p text:style-name="P14">Figcaption</text:p>
          </table:table-cell>
          <table:table-cell table:style-name="Tabla1.B2" office:value-type="string">
            <text:p text:style-name="P15"><text:span text:style-name="T2">Etiqueta utilizada para encerrar la leyenda o descripción textual asociada a un elemento </text:span><text:span text:style-name="Source_20_Text"><text:span text:style-name="T2">&lt;figure&gt;</text:span></text:span><text:span text:style-name="T2">.</text:span></text:p>
          </table:table-cell>
        </table:table-row>
        <table:table-row>
          <table:table-cell table:style-name="Tabla1.A2" office:value-type="string">
            <text:p text:style-name="P14">Figure</text:p>
          </table:table-cell>
          <table:table-cell table:style-name="Tabla1.B2" office:value-type="string">
            <text:p text:style-name="P13">Elemento que agrupa contenido independiente como imágenes, videos o diagramas, que pueden ser extraídos sin afectar el flujo del texto.</text:p>
          </table:table-cell>
        </table:table-row>
        <table:table-row>
          <table:table-cell table:style-name="Tabla1.A2" office:value-type="string">
            <text:p text:style-name="P14">Footer</text:p>
          </table:table-cell>
          <table:table-cell table:style-name="Tabla1.B2" office:value-type="string">
            <text:p text:style-name="P13">Elemento que representa el final de una sección o del documento, conteniendo información adicional sobre su "padre".</text:p>
          </table:table-cell>
        </table:table-row>
        <table:table-row>
          <table:table-cell table:style-name="Tabla1.A2" office:value-type="string">
            <text:p text:style-name="P14">Header</text:p>
          </table:table-cell>
          <table:table-cell table:style-name="Tabla1.B2" office:value-type="string">
            <text:p text:style-name="P13">Etiqueta que agrupa información introductoria, títulos o logos al comienzo del cuerpo o de una sección.</text:p>
          </table:table-cell>
        </table:table-row>
        <table:table-row>
          <table:table-cell table:style-name="Tabla1.A2" office:value-type="string">
            <text:p text:style-name="P14">Hgroup</text:p>
          </table:table-cell>
          <table:table-cell table:style-name="Tabla1.B2" office:value-type="string">
            <text:p text:style-name="P15"><text:span text:style-name="T2">Elemento destinado exclusivamente a agrupar múltiples niveles de etiquetas de título (</text:span><text:span text:style-name="Source_20_Text"><text:span text:style-name="T2">&lt;h1&gt;</text:span></text:span><text:span text:style-name="T2"> - </text:span><text:span text:style-name="Source_20_Text"><text:span text:style-name="T2">&lt;h6&gt;</text:span></text:span><text:span text:style-name="T2">).</text:span></text:p>
          </table:table-cell>
        </table:table-row>
        <table:table-row>
          <table:table-cell table:style-name="Tabla1.A2" office:value-type="string">
            <text:p text:style-name="P14">Javascript</text:p>
          </table:table-cell>
          <table:table-cell table:style-name="Tabla1.B2" office:value-type="string">
            <text:p text:style-name="P13">Lenguaje interpretado por el navegador que provee dinamismo, interactividad y funcionalidad a las aplicaciones web.</text:p>
          </table:table-cell>
        </table:table-row>
        <table:table-row>
          <table:table-cell table:style-name="Tabla1.A2" office:value-type="string">
            <text:p text:style-name="P14">Mark</text:p>
          </table:table-cell>
          <table:table-cell table:style-name="Tabla1.B2" office:value-type="string">
            <text:p text:style-name="P13">Etiqueta que resalta fragmentos de texto relevantes según las acciones del usuario, como resultados de una búsqueda.</text:p>
          </table:table-cell>
        </table:table-row>
        <table:table-row>
          <table:table-cell table:style-name="Tabla1.A2" office:value-type="string">
            <text:p text:style-name="P14">Metadata</text:p>
          </table:table-cell>
          <table:table-cell table:style-name="Tabla1.B2" office:value-type="string">
            <text:p text:style-name="P15"><text:span text:style-name="T2">Conjunto de datos que describen y proporcionan información técnica sobre otros datos (ej. etiquetas </text:span><text:span text:style-name="Source_20_Text"><text:span text:style-name="T2">&lt;meta&gt;</text:span></text:span><text:span text:style-name="T2"> en el </text:span><text:span text:style-name="Source_20_Text"><text:span text:style-name="T2">&lt;head&gt;</text:span></text:span><text:span text:style-name="T2">).</text:span></text:p>
          </table:table-cell>
        </table:table-row>
        <table:table-row>
          <table:table-cell table:style-name="Tabla1.A2" office:value-type="string">
            <text:p text:style-name="P14">Nav</text:p>
          </table:table-cell>
          <table:table-cell table:style-name="Tabla1.B2" office:value-type="string">
            <text:p text:style-name="P13">Sección del documento que contiene bloques de enlaces destinados a la <text:soft-page-break/>navegación del sitio.</text:p>
          </table:table-cell>
        </table:table-row>
        <table:table-row>
          <table:table-cell table:style-name="Tabla1.A2" office:value-type="string">
            <text:p text:style-name="P14">Plug-in</text:p>
          </table:table-cell>
          <table:table-cell table:style-name="Tabla1.B2" office:value-type="string">
            <text:p text:style-name="P13">Accesorio o complemento externo (como Flash o Java) que se inserta en un sitio web pero carece de integración real con el documento.</text:p>
          </table:table-cell>
        </table:table-row>
        <table:table-row>
          <table:table-cell table:style-name="Tabla1.A2" office:value-type="string">
            <text:p text:style-name="P14">Section</text:p>
          </table:table-cell>
          <table:table-cell table:style-name="Tabla1.B2" office:value-type="string">
            <text:p text:style-name="P13">Elemento genérico que representa una sección del documento, utilizado para organizar bloques de contenido que comparten características.</text:p>
          </table:table-cell>
        </table:table-row>
        <table:table-row>
          <table:table-cell table:style-name="Tabla1.A17" office:value-type="string">
            <text:p text:style-name="P14">Timestamp</text:p>
          </table:table-cell>
          <table:table-cell table:style-name="Tabla1.B17" office:value-type="string">
            <text:p text:style-name="P15"><text:span text:style-name="T2">Formato de fecha y hora comprensible para máquinas, utilizado como valor en el atributo </text:span><text:span text:style-name="Source_20_Text"><text:span text:style-name="T2">datetime</text:span></text:span><text:span text:style-name="T2"> del elemento </text:span><text:span text:style-name="Source_20_Text"><text:span text:style-name="T2">&lt;time&gt;</text:span></text:span><text:span text:style-name="T2">.</text:span></text:p>
          </table:table-cell>
        </table:table-row>
      </table:table>
      <text:p text:style-name="P2">-------------------------------------------------------------------------------- </text:p>
      <text:p text:style-name="Text_20_body"><text:span text:style-name="T1">Recomendación de práctica:</text:span><text:span text:style-name="T2"> Para consolidar estos conocimientos, se sugiere crear un archivo con extensión </text:span><text:span text:style-name="Source_20_Text"><text:span text:style-name="T2">.html</text:span></text:span><text:span text:style-name="T2"> y transcribir manualmente los listados de código presentados en la fuente, probándolos en navegadores modernos como Google Chrome o Mozilla Firefox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22:58:58.235229800</meta:creation-date>
    <dc:date>2026-04-12T23:01:56.464694800</dc:date>
    <meta:editing-duration>PT2M58S</meta:editing-duration>
    <meta:editing-cycles>1</meta:editing-cycles>
    <meta:document-statistic meta:table-count="1" meta:image-count="0" meta:object-count="0" meta:page-count="4" meta:paragraph-count="73" meta:word-count="1167" meta:character-count="7870" meta:non-whitespace-character-count="6796"/>
    <meta:generator>LibreOffice/25.8.5.1$Windows_X86_64 LibreOffice_project/cde5f182e321816108385dd3739c4295be919062</meta:generator>
  </office:meta>
</office:document-meta>
</file>