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line-height="150%" fo:text-indent="0cm" style:auto-text-indent="false"/>
      <style:text-properties fo:font-variant="normal" fo:text-transform="none" fo:color="#000000" loext:opacity="100%" style:font-name="rem" fo:font-size="12pt" fo:letter-spacing="normal" fo:font-style="normal" fo:font-weight="bold" officeooo:rsid="0020920e" officeooo:paragraph-rsid="0020920e" style:font-size-asian="12pt" style:font-weight-asian="bold" style:font-size-complex="12pt" style:font-weight-complex="bold" loext:padding="0cm" loext:border="none"/>
    </style:style>
    <style:style style:name="P2" style:family="paragraph" style:parent-style-name="Heading_20_1">
      <style:paragraph-properties fo:margin-left="0cm" fo:margin-right="0cm" fo:margin-top="0cm" fo:margin-bottom="0cm" style:contextual-spacing="false" fo:line-height="200%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bold" style:font-size-asian="11pt" style:font-size-complex="11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size-complex="11pt" style:font-style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" fo:font-size="11pt" fo:letter-spacing="normal" fo:font-style="italic" fo:font-weight="normal" style:font-size-asian="11pt" style:font-style-asian="italic" style:font-size-complex="11pt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bold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/>
      <style:text-properties fo:font-variant="normal" fo:text-transform="none" fo:color="#2a6099" loext:opacity="100%" style:font-name="Arial" fo:font-size="11pt" fo:letter-spacing="normal" fo:font-style="italic" fo:font-weight="normal" officeooo:rsid="0020920e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/>
      <style:text-properties fo:font-variant="normal" fo:text-transform="none" fo:color="#2a6099" loext:opacity="100%" style:font-name="Arial" fo:font-size="11pt" fo:letter-spacing="normal" fo:font-style="italic" fo:font-weight="normal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/>
    </style:style>
    <style:style style:name="T1" style:family="text">
      <style:text-properties officeooo:rsid="001b7848"/>
    </style:style>
    <style:style style:name="T2" style:family="text">
      <style:text-properties officeooo:rsid="001eda5b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20920e" style:font-weight-asian="bold" style:font-weight-complex="bold"/>
    </style:style>
    <style:style style:name="T5" style:family="text">
      <style:text-properties officeooo:rsid="0020920e"/>
    </style:style>
    <style:style style:name="T6" style:family="text">
      <style:text-properties officeooo:rsid="0021c9bf"/>
    </style:style>
    <style:style style:name="T7" style:family="text">
      <style:text-properties officeooo:rsid="0021c9bf" style:font-weight-asian="bold" style:font-weight-complex="bold"/>
    </style:style>
    <style:style style:name="T8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sobre el Capítulo 1 Introducción a HTML</text:p>
      <text:h text:style-name="P2" text:outline-level="1"><text:span text:style-name="T1">1. </text:span>De acuerdo con el texto, ¿cuál es la definición más precisa de HTML5 en la actualidad?</text:h>
      <text:p text:style-name="P3">A. Un nuevo concepto de construcción web que integra dispositivos móviles, nube y redes.</text:p>
      <text:p text:style-name="P4">B. Una simple actualización del antiguo lenguaje de etiquetas para mejorar el texto.</text:p>
      <text:p text:style-name="P5">C. Una tecnología diseñada exclusivamente para estandarizar la reproducción de video.</text:p>
      <text:p text:style-name="P5">D. Un reemplazo total de Javascript para evitar el uso de complementos externos.</text:p>
      <text:p text:style-name="P6"/>
      <text:p text:style-name="P7"><text:span text:style-name="T2">2. </text:span><text:span text:style-name="T3">¿Cuál fue el principal problema de Java y Flash que llevó a su declive en el desarrollo web?</text:span></text:p>
      <text:p text:style-name="P5">A. Su incapacidad para reproducir archivos de video de alta calidad.</text:p>
      <text:p text:style-name="P5">B. La falta de integración con el documento, funcionando como plug-ins aislados.</text:p>
      <text:p text:style-name="P5">C. La falta de soporte en los navegadores de escritorio más populares.</text:p>
      <text:p text:style-name="P5">D. Eran lenguajes demasiado sencillos para las demandas de la Web 2.0.</text:p>
      <text:p text:style-name="P8"/>
      <text:p text:style-name="P9"><text:span text:style-name="T1">3. </text:span>En la combinación que define a HTML5, ¿cuál es la responsabilidad específica de CSS?</text:p>
      <text:p text:style-name="P5">A. Proveer los elementos estructurales básicos del documento.</text:p>
      <text:p text:style-name="P5">B. Interpretar el código del lado del servidor para el navegador.</text:p>
      <text:p text:style-name="P5">C. Presentar la estructura y el contenido de forma atractiva y utilizable.</text:p>
      <text:p text:style-name="P5">D. Gestionar el dinamismo y la funcionalidad de las aplicaciones.</text:p>
      <text:p text:style-name="P10"/>
      <text:p text:style-name="P7"><text:span text:style-name="T4">4. </text:span><text:span text:style-name="T3">¿Cómo debe declararse correctamente el tipo de documento para activar el modo estándar en HTML5?</text:span></text:p>
      <text:p text:style-name="P5">A. &lt;html type="html5"&gt;</text:p>
      <text:p text:style-name="P5">B. &lt;!DOCTYPE HTML PUBLIC "-//W3C//DTD HTML 5.0//EN"&gt;</text:p>
      <text:p text:style-name="P5">C. &lt;doctype html5&gt;</text:p>
      <text:p text:style-name="P5">D. &lt;!DOCTYPE html&gt;</text:p>
      <text:p text:style-name="P9"/>
      <text:p text:style-name="P9">5. ¿Para qué sirve el atributo 'lang' dentro de la etiqueta `&lt;html&gt;`?</text:p>
      <text:p text:style-name="P5">A. Para configurar el teclado del usuario que visita el sitio.</text:p>
      <text:p text:style-name="P5">B. Para definir el idioma humano del contenido del documento.</text:p>
      <text:p text:style-name="P5">C. Para especificar el lenguaje de programación utilizado en el archivo.</text:p>
      <text:p text:style-name="P5">D. Es un atributo opcional que ya no se recomienda en HTML5.</text:p>
      <text:p text:style-name="P5"/>
      <text:p text:style-name="P9">6. ¿Cuál es la principal diferencia entre la información contenida en `&lt;head&gt;` y la contenida en `&lt;body&gt;`?</text:p>
      <text:p text:style-name="P5">A. La sección `&lt;head&gt;` es opcional si se utiliza la nueva etiqueta `&lt;header&gt;`.</text:p>
      <text:p text:style-name="P5">B. `&lt;head&gt;` contiene metadatos y archivos externos, mientras que `&lt;body&gt;` contiene la parte visible del sitio.</text:p>
      <text:p text:style-name="P5">C. La información en `&lt;head&gt;` es visible para el usuario, mientras que `&lt;body&gt;` es invisible.</text:p>
      <text:p text:style-name="P5"><text:soft-page-break/>D. En HTML5 ya no se utiliza la etiqueta `&lt;head&gt;`, solo `&lt;body&gt;`.</text:p>
      <text:p text:style-name="P5"/>
      <text:p text:style-name="P9"><text:span text:style-name="T5">7. </text:span>En HTML5, ¿cómo se simplifica la definición del juego de caracteres (charset)?</text:p>
      <text:p text:style-name="P5">A. Ya no es necesario definirlo, pues los navegadores lo detectan automáticamente.</text:p>
      <text:p text:style-name="P5">B. Agregando el atributo 'charset' directamente a la etiqueta `&lt;body&gt;`.</text:p>
      <text:p text:style-name="P5">C. Se define mediante una regla específica en el archivo CSS externo.</text:p>
      <text:p text:style-name="P5">D. Utilizando la etiqueta `&lt;meta charset="..."&gt;` dentro del `&lt;head&gt;`.</text:p>
      <text:p text:style-name="P5"/>
      <text:p text:style-name="P9"><text:span text:style-name="T5">8. </text:span>¿Qué par de atributos son fundamentales en HTML5 para vincular una hoja de estilo CSS externa mediante el elemento `&lt;link&gt;`?</text:p>
      <text:p text:style-name="P5">A. 'style' y 'link'</text:p>
      <text:p text:style-name="P5">B. 'rel' y 'href'</text:p>
      <text:p text:style-name="P5">C. 'src' y 'rel'</text:p>
      <text:p text:style-name="P5">D. 'type' y 'href'</text:p>
      <text:p text:style-name="P5"/>
      <text:p text:style-name="P9"><text:span text:style-name="T5">9. </text:span>¿Por qué el uso del elemento `&lt;div&gt;` para crear la estructura principal es considerado una práctica menos óptima en comparación con los nuevos elementos de HTML5?</text:p>
      <text:p text:style-name="P5">A. Porque los estilos CSS no pueden aplicarse correctamente a las etiquetas `div`.</text:p>
      <text:p text:style-name="P5">B. Porque el elemento `&lt;div&gt;` consume más recursos del procesador en dispositivos móviles.</text:p>
      <text:p text:style-name="P5">C. Porque HTML5 ha declarado el elemento `&lt;div&gt;` como obsoleto y pronto desaparecerá.</text:p>
      <text:p text:style-name="P5"/>
      <text:p text:style-name="P5">D. Porque la etiqueta `div` solo especifica una división sin dar pistas sobre su propósito o contenido.</text:p>
      <text:p text:style-name="P5"/>
      <text:p text:style-name="P9"><text:span text:style-name="T5">10. </text:span>¿Cuál es la función del elemento `&lt;nav&gt;` en la estructura de una página web?</text:p>
      <text:p text:style-name="P5">A. Activar la compatibilidad de navegación con dispositivos móviles antiguos.</text:p>
      <text:p text:style-name="P5">B. Contener cualquier enlace que aparezca en el cuerpo del documento.</text:p>
      <text:p text:style-name="P5">C. Servir de contenedor para los botones de retroceso del navegador.</text:p>
      <text:p text:style-name="P5">D. Indicar una sección que contiene enlaces con propósitos de navegación, como menús.</text:p>
      <text:p text:style-name="P5"/>
      <text:p text:style-name="P9"><text:span text:style-name="T6">11. </text:span>¿En qué se diferencia el uso de `&lt;header&gt;` respecto a la etiqueta `&lt;head&gt;`?</text:p>
      <text:p text:style-name="P5">A. `&lt;header&gt;` solo puede existir una vez por página, mientras que `&lt;head&gt;` puede repetirse.</text:p>
      <text:p text:style-name="P5">B. No hay diferencia; ambos elementos pueden usarse indistintamente en HTML5.</text:p>
      <text:p text:style-name="P5">C. `&lt;header&gt;` sustituye a la etiqueta `&lt;title&gt;` en las nuevas especificaciones.</text:p>
      <text:p text:style-name="P5">D. `&lt;head&gt;` es para metadatos del documento total, mientras que `&lt;header&gt;` es para información introductoria del cuerpo o secciones.</text:p>
      <text:p text:style-name="P11"/>
      <text:p text:style-name="P9"><text:span text:style-name="T6">12. </text:span>¿Qué elemento semántico es el más adecuado para representar una barra lateral con contenido relacionado pero secundario?</text:p>
      <text:p text:style-name="P5">A. &lt;aside&gt;</text:p>
      <text:p text:style-name="P5"><text:soft-page-break/>B. &lt;sidebar&gt;</text:p>
      <text:p text:style-name="P5">C. &lt;section&gt;</text:p>
      <text:p text:style-name="P5">D. &lt;footer&gt;</text:p>
      <text:p text:style-name="P11"/>
      <text:p text:style-name="P9"><text:span text:style-name="T6">13. </text:span>¿Cuál es el propósito del elemento `&lt;article&gt;` en la organización del contenido?</text:p>
      <text:p text:style-name="P5">A. Indicar que el texto contenido ha sido citado de una fuente externa.</text:p>
      <text:p text:style-name="P5">B. Definir el área donde se aplicarán las reglas de estilo de texto.</text:p>
      <text:p text:style-name="P5">C. Agrupar porciones de información que son unidades independientes de contenido.</text:p>
      <text:p text:style-name="P5">D. Contener únicamente textos periodísticos o noticias digitales.</text:p>
      <text:p text:style-name="P7"><text:span text:style-name="T7">14. </text:span><text:span text:style-name="T3">¿Bajo qué circunstancia específica se debe utilizar el elemento `&lt;hgroup&gt;`?</text:span></text:p>
      <text:p text:style-name="P5">A. Para unir un título con una imagen dentro de un `&lt;header&gt;`.</text:p>
      <text:p text:style-name="P5">B. Para agrupar elementos de encabezado (H1 a H6) cuando una cabecera tiene múltiples niveles.</text:p>
      <text:p text:style-name="P5">C. Siempre que se use una etiqueta `&lt;h1&gt;` en el documento.</text:p>
      <text:p text:style-name="P5">D. Para crear grupos de navegación por secciones.</text:p>
      <text:p text:style-name="P5"/>
      <text:p text:style-name="P9"><text:span text:style-name="T6">15. </text:span>¿Qué relación establecen las etiquetas `&lt;figure&gt;` y `&lt;figcaption&gt;`?</text:p>
      <text:p text:style-name="P5">A. `&lt;figcaption&gt;` es la etiqueta para imágenes y `&lt;figure&gt;` es la etiqueta para videos.</text:p>
      <text:p text:style-name="P5">B. Se usan para crear figuras geométricas mediante código Javascript.</text:p>
      <text:p text:style-name="P5">C. Son etiquetas intercambiables que sirven para resaltar texto importante.</text:p>
      <text:p text:style-name="P5">D. `&lt;figure&gt;` es el contenedor y `&lt;figcaption&gt;` proporciona una descripción textual para su contenido.</text:p>
      <text:p text:style-name="P5"/>
      <text:p text:style-name="P9"><text:span text:style-name="T6">16. </text:span>¿Cuál es la función semántica de la etiqueta `&lt;mark&gt;` en HTML5?</text:p>
      <text:p text:style-name="P5">A. Crear un enlace dinámico hacia otra parte del mismo documento.</text:p>
      <text:p text:style-name="P5">B. Poner el texto en negrita para indicar importancia.</text:p>
      <text:p text:style-name="P5">C. Resaltar texto que es relevante debido a las acciones del usuario, como resultados de búsqueda.</text:p>
      <text:p text:style-name="P5">D. Indicar que un texto ha sido corregido por el autor.</text:p>
      <text:p text:style-name="P11"/>
      <text:p text:style-name="P9"><text:span text:style-name="T6">17. </text:span>¿Cómo ha cambiado el propósito de la etiqueta `&lt;small&gt;` en HTML5 respecto a las versiones anteriores?</text:p>
      <text:p text:style-name="P5">A. Ahora representa la 'letra pequeña' legal, como descargos de responsabilidad o derechos reservados.</text:p>
      <text:p text:style-name="P5">B. Se utiliza para definir subtítulos de menor importancia que un `&lt;h2&gt;`.</text:p>
      <text:p text:style-name="P5">C. Ya no se usa porque el tamaño de la letra solo debe cambiarse con CSS.</text:p>
      <text:p text:style-name="P5">D. Se usa para identificar el nombre de los autores de un artículo.</text:p>
      <text:p text:style-name="P11"/>
      <text:p text:style-name="P9"><text:span text:style-name="T6">18. </text:span>¿Qué contenido debe encerrarse dentro del elemento `&lt;cite&gt;` según la nueva especificación?</text:p>
      <text:p text:style-name="P5"><text:soft-page-break/>A. El título de un trabajo creativo, como un libro, una película o una canción.</text:p>
      <text:p text:style-name="P5">B. Una frase textual copiada de otro sitio web.</text:p>
      <text:p text:style-name="P5">C. La URL o dirección web de donde se obtuvo la información.</text:p>
      <text:p text:style-name="P5">D. El nombre del autor de una obra literaria o científica.</text:p>
      <text:p text:style-name="P11"/>
      <text:p text:style-name="P9"><text:span text:style-name="T6">19. </text:span>¿Cuál es la ubicación recomendada para el elemento `&lt;address&gt;` dentro de un documento?</text:p>
      <text:p text:style-name="P5">A. Inmediatamente después de cada etiqueta `&lt;nav&gt;`.</text:p>
      <text:p text:style-name="P5">B. Dentro de las etiquetas `&lt;hgroup&gt;` junto a los títulos.</text:p>
      <text:p text:style-name="P5">C. Dentro de un elemento `&lt;footer&gt;` para proveer información de contacto.</text:p>
      <text:p text:style-name="P5">D. En la parte superior de la cabecera `&lt;head&gt;`.</text:p>
      <text:p text:style-name="P11"/>
      <text:p text:style-name="P7"><text:span text:style-name="T7">20. </text:span><text:span text:style-name="T3">En el elemento `&lt;time&gt;`, ¿cuál es la función del atributo 'datetime'?</text:span></text:p>
      <text:p text:style-name="P5">A. Cambiar el formato visual de la fecha según la región del usuario.</text:p>
      <text:p text:style-name="P5">B. Proporcionar una versión de la fecha y hora en un formato comprensible para el navegador.</text:p>
      <text:p text:style-name="P5">C. Indicar cuánto tiempo debe permanecer visible una sección en la pantalla.</text:p>
      <text:p text:style-name="P12"><text:span text:style-name="T8">D. Mostrar la hora actual del sistema automáticamente.</text:span></text:p>
      <text:p text:style-name="P5"/>
      <text:p text:style-name="P9"><text:span text:style-name="T6">21. </text:span>¿Qué indica la presencia del atributo 'pubdate' en una etiqueta `&lt;time&gt;`?</text:p>
      <text:p text:style-name="P5">A. Que el valor del atributo 'datetime' representa la fecha de publicación del documento o artículo.</text:p>
      <text:p text:style-name="P5">B. Que la fecha debe mostrarse en formato público internacional.</text:p>
      <text:p text:style-name="P5">C. Que la fecha indicada es la fecha de nacimiento del autor.</text:p>
      <text:p text:style-name="P5">D. Que la página debe ser actualizada automáticamente en esa fecha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21:56:56.734571300</meta:creation-date>
    <dc:date>2026-04-12T22:51:39.271001800</dc:date>
    <meta:editing-duration>PT54M38S</meta:editing-duration>
    <meta:editing-cycles>11</meta:editing-cycles>
    <meta:generator>LibreOffice/25.8.5.1$Windows_X86_64 LibreOffice_project/cde5f182e321816108385dd3739c4295be919062</meta:generator>
    <meta:print-date>2026-04-12T22:48:14.294422900</meta:print-date>
    <meta:printed-by>Archivos PDF</meta:printed-by>
    <meta:document-statistic meta:table-count="0" meta:image-count="0" meta:object-count="0" meta:page-count="4" meta:paragraph-count="106" meta:word-count="1226" meta:character-count="7563" meta:non-whitespace-character-count="6443"/>
  </office:meta>
</office:document-meta>
</file>