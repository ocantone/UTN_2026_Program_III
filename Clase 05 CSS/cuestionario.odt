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officeooo:rsid="000231af" officeooo:paragraph-rsid="000231af" style:font-weight-asian="bold" style:font-weight-complex="bold"/>
    </style:style>
    <style:style style:name="P2" style:family="paragraph" style:parent-style-name="Standard">
      <style:text-properties style:font-name="Arial" officeooo:rsid="000231af" officeooo:paragraph-rsid="000231af"/>
    </style:style>
    <style:style style:name="P3" style:family="paragraph" style:parent-style-name="Standard">
      <style:text-properties style:font-name="Arial" style:text-underline-style="solid" style:text-underline-width="auto" style:text-underline-color="font-color" officeooo:rsid="000231af" officeooo:paragraph-rsid="000231af"/>
    </style:style>
    <style:style style:name="P4" style:family="paragraph" style:parent-style-name="Standard">
      <style:text-properties style:font-name="Arial" fo:font-weight="bold" officeooo:rsid="00040a1d" officeooo:paragraph-rsid="00040a1d" style:font-weight-asian="bold" style:font-weight-complex="bold"/>
    </style:style>
    <style:style style:name="P5" style:family="paragraph" style:parent-style-name="Standard">
      <style:text-properties style:font-name="Arial" officeooo:rsid="00040a1d" officeooo:paragraph-rsid="00040a1d"/>
    </style:style>
    <style:style style:name="P6" style:family="paragraph" style:parent-style-name="Standard">
      <style:text-properties style:font-name="Arial" officeooo:rsid="000231af" officeooo:paragraph-rsid="00040a1d"/>
    </style:style>
    <style:style style:name="T1" style:family="text">
      <style:text-properties officeooo:rsid="000582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¿Cuál es la función principal de CSS en el paradigma actual de desarrollo web junto a HTML5?</text:p>
      <text:p text:style-name="P1"/>
      <text:p text:style-name="P2">A. Proveer funcionalidad interactiva y lógica de programación al sitio.</text:p>
      <text:p text:style-name="P2"/>
      <text:p text:style-name="P2">B. Reemplazar completamente las etiquetas de HTML para mejorar el rendimiento.</text:p>
      <text:p text:style-name="P2"/>
      <text:p text:style-name="P2">C. Definir la estructura jerárquica y el contenido del documento.</text:p>
      <text:p text:style-name="P2"/>
      <text:p text:style-name="P2">D. Separar la estructura de la presentación visual del documento.</text:p>
      <text:p text:style-name="P2"/>
      <text:p text:style-name="P2"/>
      <text:p text:style-name="Standard"/>
      <text:p text:style-name="P1">2.De acuerdo al material, ¿cómo se comportan por defecto los elementos estructurales de tipo 'block' en la pantalla?</text:p>
      <text:p text:style-name="P1"/>
      <text:p text:style-name="P2">A. Permanecen ocultos hasta que se les aplica una regla CSS específica.</text:p>
      <text:p text:style-name="P2"/>
      <text:p text:style-name="P2">B. Se posicionan uno sobre otro hacia abajo en la página.</text:p>
      <text:p text:style-name="P2"/>
      <text:p text:style-name="P2">C. Se posicionan uno al lado del otro en la misma línea horizontal.</text:p>
      <text:p text:style-name="P2"/>
      <text:p text:style-name="P2">D. Ajustan su tamaño automáticamente para compartir la misma fila siempre.</text:p>
      <text:p text:style-name="P2"/>
      <text:p text:style-name="P2"/>
      <text:p text:style-name="P1">3. ¿Cuál es la principal desventaja de utilizar 'Estilos en línea' (atributo style) en un documento extenso?</text:p>
      <text:p text:style-name="P1"/>
      <text:p text:style-name="P2">A. Requiere el uso de archivos externos adicionales de forma obligatoria.</text:p>
      <text:p text:style-name="P2"/>
      <text:p text:style-name="P2">B. Los navegadores modernos ya no interpretan este atributo.</text:p>
      <text:p text:style-name="P2"/>
      <text:p text:style-name="P2">C. Solo permite modificar el tamaño de la fuente pero no los colores.</text:p>
      <text:p text:style-name="P2"/>
      <text:p text:style-name="P2">D. Dificulta el mantenimiento y aumenta innecesariamente el tamaño del código.</text:p>
      <text:p text:style-name="P2"/>
      <text:p text:style-name="P1">4.¿Qué símbolo se utiliza en CSS para referenciar un elemento a través de su atributo id?</text:p>
      <text:p text:style-name="P1"/>
      <text:p text:style-name="P2"/>
      <text:p text:style-name="P1">5. ¿Qué selector de CSS3 se utiliza para aplicar estilos a un elemento &lt;p&gt; que es hijo directo de un elemento &lt;div&gt;?</text:p>
      <text:p text:style-name="P1"/>
      <text:p text:style-name="P2">A. div&gt;p</text:p>
      <text:p text:style-name="P2"/>
      <text:p text:style-name="P2">B. div.p</text:p>
      <text:p text:style-name="P2"/>
      <text:p text:style-name="P2">C. div∼p</text:p>
      <text:p text:style-name="P2"/>
      <text:p text:style-name="P2">D. div+p</text:p>
      <text:p text:style-name="P2"/>
      <text:p text:style-name="P1">6. En CSS3, ¿qué efecto produce el selector de atributo p[name∗="mi"]?</text:p>
      <text:p text:style-name="P2"><text:soft-page-break/></text:p>
      <text:p text:style-name="P2">A. Selecciona párrafos cuyo atributo name comienza exactamente con "mi".</text:p>
      <text:p text:style-name="P2"/>
      <text:p text:style-name="P2">B. Selecciona párrafos cuyo atributo name termina exactamente con "mi".</text:p>
      <text:p text:style-name="P2"/>
      <text:p text:style-name="P2">C. Selecciona párrafos que no tienen un atributo name definido.</text:p>
      <text:p text:style-name="P2"/>
      <text:p text:style-name="P2">D. Selecciona párrafos cuyo atributo name contiene la cadena "mi" en cualquier posición.</text:p>
      <text:p text:style-name="P2"/>
      <text:p text:style-name="P1">7. Si un elemento tiene un ancho de 200px, un padding de 10px en todos sus lados y un borde de 2px, ¿cuál es su ancho real ocupado según el Modelo de Caja Tradicional estándar?</text:p>
      <text:p text:style-name="P1"/>
      <text:p text:style-name="P2">A. 220px</text:p>
      <text:p text:style-name="P2"/>
      <text:p text:style-name="P2">B. 200px</text:p>
      <text:p text:style-name="P2"/>
      <text:p text:style-name="P2">C. 224px</text:p>
      <text:p text:style-name="P2"/>
      <text:p text:style-name="P2">D. 212px</text:p>
      <text:p text:style-name="P2"/>
      <text:p text:style-name="P1">8. ¿Cuál es la función de la pseudo-clase :nth−child(even)?</text:p>
      <text:p text:style-name="P1"/>
      <text:p text:style-name="P2"><text:span text:style-name="T1">A</text:span>. Seleccionar el último elemento de una lista de hermanos.</text:p>
      <text:p text:style-name="P2"/>
      <text:p text:style-name="P2">B. Seleccionar todos los elementos que tienen un índice impar.</text:p>
      <text:p text:style-name="P2"/>
      <text:p text:style-name="P2">C. Seleccionar todos los elementos que tienen un índice par entre sus hermanos.</text:p>
      <text:p text:style-name="P2"/>
      <text:p text:style-name="P2">D. Seleccionar únicamente el segundo elemento hijo del documento.</text:p>
      <text:p text:style-name="P2"/>
      <text:p text:style-name="P1">9. ¿Para qué se utiliza la propiedad 'clear' con el valor 'both' en el Modelo de Caja Tradicional?</text:p>
      <text:p text:style-name="P1"/>
      <text:p text:style-name="P2">A. Para borrar el contenido de texto dentro de una caja de diseño.</text:p>
      <text:p text:style-name="P2"/>
      <text:p text:style-name="P2">B. Para eliminar los márgenes y rellenos de todos los elementos del sitio.</text:p>
      <text:p text:style-name="P2"/>
      <text:p text:style-name="P2">C. Para centrar automáticamente un elemento block dentro de su padre.</text:p>
      <text:p text:style-name="P2"/>
      <text:p text:style-name="P2">D. Para restaurar el flujo normal del documento y posicionar un elemento debajo de las cajas flotantes.</text:p>
      <text:p text:style-name="P3"/>
      <text:p text:style-name="P1">10.¿Qué propiedad de CSS3 permite que el 'padding' y el 'border' se incluyan dentro del ancho total especificado de un elemento?</text:p>
      <text:p text:style-name="P1"/>
      <text:p text:style-name="P2"/>
      <text:p text:style-name="P1">11. ¿Qué prefijo debe utilizarse específicamente para asegurar la compatibilidad de propiedades experimentales en navegadores Firefox?</text:p>
      <text:p text:style-name="P1"/>
      <text:p text:style-name="P2">A. -moz-</text:p>
      <text:p text:style-name="P2"/>
      <text:p text:style-name="P2"><text:soft-page-break/>B. -ms-</text:p>
      <text:p text:style-name="P2"/>
      <text:p text:style-name="P2">C. -webkit-</text:p>
      <text:p text:style-name="P2"/>
      <text:p text:style-name="P2">D. -o-</text:p>
      <text:p text:style-name="P2"/>
      <text:p text:style-name="P1">12.¿Cuál es la diferencia fundamental entre 'margin' y 'padding'?</text:p>
      <text:p text:style-name="P1"/>
      <text:p text:style-name="P2">A. El margin es el espacio fuera del borde del elemento, y el padding es el espacio entre el contenido y el borde.</text:p>
      <text:p text:style-name="P2"/>
      <text:p text:style-name="P2">B. Padding define el grosor del borde y margin define el color de fondo.</text:p>
      <text:p text:style-name="P2"/>
      <text:p text:style-name="P2">C. El padding es el espacio exterior al borde, mientras que el margin es el espacio interior.</text:p>
      <text:p text:style-name="P2"/>
      <text:p text:style-name="P2">D. Margin solo se aplica a elementos inline y padding solo a elementos block.</text:p>
      <text:p text:style-name="P2"/>
      <text:p text:style-name="P1">13.¿Cómo se define una regla en CSS que afecte a todos los elementos que tengan la clase 'seccion'?</text:p>
      <text:p text:style-name="P1"/>
      <text:p text:style-name="P2"/>
      <text:p text:style-name="P1">14. ¿Qué sucede si aplicamos 'text-align: center' al elemento &lt;body&gt; pero queremos que el contenido dentro de un &lt;div&gt; interno vuelva a estar alineado a la izquierda?</text:p>
      <text:p text:style-name="P1"/>
      <text:p text:style-name="P2">A. El texto se alineará automáticamente a la izquierda sin hacer nada más.</text:p>
      <text:p text:style-name="P2"/>
      <text:p text:style-name="P2">B. Debemos aplicar 'text-align: left' específicamente a ese &lt;div&gt; interno.</text:p>
      <text:p text:style-name="P2"/>
      <text:p text:style-name="P2">C. Debemos borrar la etiqueta &lt;body&gt; para que el estilo deje de aplicarse.</text:p>
      <text:p text:style-name="P2"/>
      <text:p text:style-name="P2">D. No es posible cambiarlo porque el estilo de body es obligatorio para todos sus hijos.</text:p>
      <text:p text:style-name="P2"/>
      <text:p text:style-name="P1">15. ¿Qué pseudo-clase se utiliza para referenciar un elemento solo si es el único hijo disponible de su padre?</text:p>
      <text:p text:style-name="P1"/>
      <text:p text:style-name="P2"/>
      <text:p text:style-name="P1">16. En el contexto de menús de navegación, ¿qué permite el valor 'inline-block' en la propiedad 'display'?</text:p>
      <text:p text:style-name="P1"/>
      <text:p text:style-name="P2">A. Que el menú desaparezca de la pantalla para ser reemplazado por un icono.</text:p>
      <text:p text:style-name="P2"/>
      <text:p text:style-name="P2">B. Forzar a que cada opción del menú ocupe el 100% del ancho disponible.</text:p>
      <text:p text:style-name="P2"/>
      <text:p text:style-name="P2">C. Que los elementos se comporten como bloques pero se posicionen uno al lado del otro sin saltos de línea.</text:p>
      <text:p text:style-name="P2"/>
      <text:p text:style-name="P2">D. Que los elementos de la lista mantengan siempre el punto o viñeta por defecto.</text:p>
      <text:p text:style-name="P2"/>
      <text:p text:style-name="P1">17. ¿Qué selector se utiliza para aplicar un estilo a todos los elementos del cuerpo del documento para establecer reglas básicas?</text:p>
      <text:p text:style-name="P1"/>
      <text:p text:style-name="P2"/>
      <text:p text:style-name="P1"><text:soft-page-break/>18. ¿Cuál es la función de la pseudo-clase :not(p)?</text:p>
      <text:p text:style-name="P1"/>
      <text:p text:style-name="P2">A. Aplicar el estilo solo a los elementos de párrafo.</text:p>
      <text:p text:style-name="P2"/>
      <text:p text:style-name="P2">B. Aplicar el estilo a todos los elementos excepto a los párrafos.</text:p>
      <text:p text:style-name="P2"/>
      <text:p text:style-name="P2">C. Eliminar todos los párrafos del código HTML.</text:p>
      <text:p text:style-name="P2"/>
      <text:p text:style-name="P2">D. Indicar al navegador que el elemento párrafo no existe en CSS3.</text:p>
      <text:p text:style-name="P2"/>
      <text:p text:style-name="P4">19. ¿Cuál es el símbolo utilizado para el selector de hermanos generales en CSS3 (que no necesitan ser adyacentes)?</text:p>
      <text:p text:style-name="P4"/>
      <text:p text:style-name="P5"/>
      <text:p text:style-name="P4">20. En HTML5, ¿por qué es recomendable declarar los nuevos elementos estructurales (como &lt;header&gt;) con 'display: block'?</text:p>
      <text:p text:style-name="P4"/>
      <text:p text:style-name="P5">A. Porque HTML5 prohíbe el uso de elementos inline en la cabecera.</text:p>
      <text:p text:style-name="P5"/>
      <text:p text:style-name="P5">B. Para que los navegadores antiguos que no los reconocen los traten como cajas de bloque y no como texto en línea.</text:p>
      <text:p text:style-name="P5"/>
      <text:p text:style-name="P5">C. Para reducir automáticamente el tamaño de las imágenes dentro de la sección.</text:p>
      <text:p text:style-name="P5"/>
      <text:p text:style-name="P5">D. Para evitar que el usuario pueda copiar el texto contenido en ellos.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0T07:14:32.781996600</meta:creation-date>
    <dc:date>2026-04-20T08:43:22.705326900</dc:date>
    <meta:editing-duration>PT1H28M49S</meta:editing-duration>
    <meta:editing-cycles>6</meta:editing-cycles>
    <meta:generator>LibreOffice/25.8.5.1$Windows_X86_64 LibreOffice_project/cde5f182e321816108385dd3739c4295be919062</meta:generator>
    <meta:document-statistic meta:table-count="0" meta:image-count="0" meta:object-count="0" meta:page-count="4" meta:paragraph-count="76" meta:word-count="937" meta:character-count="5511" meta:non-whitespace-character-count="4650"/>
  </office:meta>
</office:document-meta>
</file>