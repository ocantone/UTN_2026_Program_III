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231af" officeooo:paragraph-rsid="000231af" style:font-weight-asian="bold" style:font-weight-complex="bold"/>
    </style:style>
    <style:style style:name="P2" style:family="paragraph" style:parent-style-name="Standard">
      <style:text-properties style:font-name="Arial" officeooo:rsid="000231af" officeooo:paragraph-rsid="000231af"/>
    </style:style>
    <style:style style:name="P3" style:family="paragraph" style:parent-style-name="Standard">
      <style:text-properties style:font-name="Arial" fo:font-weight="bold" officeooo:rsid="00040a1d" officeooo:paragraph-rsid="00040a1d" style:font-weight-asian="bold" style:font-weight-complex="bold"/>
    </style:style>
    <style:style style:name="P4" style:family="paragraph" style:parent-style-name="Standard">
      <style:text-properties style:font-name="Arial" officeooo:rsid="00040a1d" officeooo:paragraph-rsid="00040a1d"/>
    </style:style>
    <style:style style:name="T1" style:family="text">
      <style:text-properties officeooo:rsid="000582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¿Cuál es la función principal de CSS en el paradigma actual de desarrollo web junto a HTML5?</text:p>
      <text:p text:style-name="P1"/>
      <text:p text:style-name="P2">A. Proveer funcionalidad interactiva y lógica de programación al sitio.</text:p>
      <text:p text:style-name="P2">La funcionalidad y el comportamiento dinámico son tareas que corresponden a JavaScript, no a CSS.</text:p>
      <text:p text:style-name="P2"/>
      <text:p text:style-name="P2">B. Reemplazar completamente las etiquetas de HTML para mejorar el rendimiento.</text:p>
      <text:p text:style-name="P2">CSS actúa como un complemento de HTML y no como un reemplazo, ya que ambos lenguajes trabajan de forma integrada.</text:p>
      <text:p text:style-name="P2"/>
      <text:p text:style-name="P2">C. Definir la estructura jerárquica y el contenido del documento.</text:p>
      <text:p text:style-name="P2">La estructura y la organización de las secciones son responsabilidades inherentes al lenguaje HTML.</text:p>
      <text:p text:style-name="P2"/>
      <text:p text:style-name="P2">D. Separar la estructura de la presentación visual del documento.</text:p>
      <text:p text:style-name="P2">Respuesta correcta(omitida)</text:p>
      <text:p text:style-name="P2">CSS fue adoptado específicamente para gestionar el diseño y estilo, permitiendo que HTML se centre únicamente en la estructura.</text:p>
      <text:p text:style-name="P2"/>
      <text:p text:style-name="Standard"/>
      <text:p text:style-name="P1">2.De acuerdo al material, ¿cómo se comportan por defecto los elementos estructurales de tipo 'block' en la pantalla?</text:p>
      <text:p text:style-name="P1"/>
      <text:p text:style-name="P2">A. Permanecen ocultos hasta que se les aplica una regla CSS específica.</text:p>
      <text:p text:style-name="P2">Los navegadores otorgan estilos por defecto que hacen visibles estos elementos según su tipo estructural.</text:p>
      <text:p text:style-name="P2"/>
      <text:p text:style-name="P2">B. Se posicionan uno sobre otro hacia abajo en la página.</text:p>
      <text:p text:style-name="P2">Respuesta correcta(omitida)</text:p>
      <text:p text:style-name="P2">Los elementos de bloque ocupan todo el ancho disponible y fuerzan un salto de línea, apilándose verticalmente.</text:p>
      <text:p text:style-name="P2"/>
      <text:p text:style-name="P2">C. Se posicionan uno al lado del otro en la misma línea horizontal.</text:p>
      <text:p text:style-name="P2">Este comportamiento es característico de los elementos 'inline', no de los de bloque.</text:p>
      <text:p text:style-name="P2"/>
      <text:p text:style-name="P2">D. Ajustan su tamaño automáticamente para compartir la misma fila siempre.</text:p>
      <text:p text:style-name="P2">Los elementos block tienden a ocupar el ancho máximo disponible de su contenedor padre por defecto.</text:p>
      <text:p text:style-name="P2"/>
      <text:p text:style-name="P2"/>
      <text:p text:style-name="P1">3. ¿Cuál es la principal desventaja de utilizar 'Estilos en línea' (atributo style) en un documento extenso?</text:p>
      <text:p text:style-name="P1"/>
      <text:p text:style-name="P2">A. Requiere el uso de archivos externos adicionales de forma obligatoria.</text:p>
      <text:p text:style-name="P2">Precisamente los estilos en línea se escriben dentro del mismo HTML, evitando archivos externos.</text:p>
      <text:p text:style-name="P2"/>
      <text:p text:style-name="P2">B. Los navegadores modernos ya no interpretan este atributo.</text:p>
      <text:p text:style-name="P2">El atributo style sigue siendo válido y procesado, aunque su uso masivo no sea una buena práctica.</text:p>
      <text:p text:style-name="P2"/>
      <text:p text:style-name="P2"><text:soft-page-break/>C. Solo permite modificar el tamaño de la fuente pero no los colores.</text:p>
      <text:p text:style-name="P2">El atributo style permite aplicar cualquier propiedad CSS válida al elemento seleccionado.</text:p>
      <text:p text:style-name="P2"/>
      <text:p text:style-name="P2">D. Dificulta el mantenimiento y aumenta innecesariamente el tamaño del código.</text:p>
      <text:p text:style-name="P2">Respuesta correcta(omitida)</text:p>
      <text:p text:style-name="P2">Al repetir estilos en cada etiqueta, cualquier cambio global requiere modificar cada elemento individualmente, lo cual es ineficiente.</text:p>
      <text:p text:style-name="P2"/>
      <text:p text:style-name="P1">4.¿Qué símbolo se utiliza en CSS para referenciar un elemento a través de su atributo id?</text:p>
      <text:p text:style-name="P1"/>
      <text:p text:style-name="P2">A. #</text:p>
      <text:p text:style-name="P2">Respuesta correcta(omitida)</text:p>
      <text:p text:style-name="P2">El símbolo de almohadilla o numeral es el selector estándar para identificadores únicos en CSS.</text:p>
      <text:p text:style-name="P2"/>
      <text:p text:style-name="P1">5. ¿Qué selector de CSS3 se utiliza para aplicar estilos a un elemento &lt;p&gt; que es hijo directo de un elemento &lt;div&gt;?</text:p>
      <text:p text:style-name="P1"/>
      <text:p text:style-name="P2">A. div&gt;p</text:p>
      <text:p text:style-name="P2">Respuesta correcta(omitida)</text:p>
      <text:p text:style-name="P2">El símbolo mayor que indica que el elemento de la derecha debe tener al de la izquierda como su padre inmediato.</text:p>
      <text:p text:style-name="P2"/>
      <text:p text:style-name="P2">B. div.p</text:p>
      <text:p text:style-name="P2">Esta sintaxis buscaría un elemento con una clase llamada 'p' dentro de un div, no la etiqueta de párrafo.</text:p>
      <text:p text:style-name="P2"/>
      <text:p text:style-name="P2">C. div∼p</text:p>
      <text:p text:style-name="P2">La tilde se utiliza para referenciar hermanos generales que aparecen después del primer elemento.</text:p>
      <text:p text:style-name="P2"/>
      <text:p text:style-name="P2">D. div+p</text:p>
      <text:p text:style-name="P2">Este selector se usa para hermanos adyacentes, no para relaciones de padre e hijo directo.</text:p>
      <text:p text:style-name="P2"/>
      <text:p text:style-name="P1">6. En CSS3, ¿qué efecto produce el selector de atributo p[name∗="mi"]?</text:p>
      <text:p text:style-name="P2"/>
      <text:p text:style-name="P2">A. Selecciona párrafos cuyo atributo name comienza exactamente con "mi".</text:p>
      <text:p text:style-name="P2">Para seleccionar el inicio de una cadena se utiliza el símbolo <text:s/></text:p>
      <text:p text:style-name="P2">=.</text:p>
      <text:p text:style-name="P2"/>
      <text:p text:style-name="P2">B. Selecciona párrafos cuyo atributo name termina exactamente con "mi".</text:p>
      <text:p text:style-name="P2">Para seleccionar el final de una cadena se utiliza el símbolo \= $.</text:p>
      <text:p text:style-name="P2"/>
      <text:p text:style-name="P2">C. Selecciona párrafos que no tienen un atributo name definido.</text:p>
      <text:p text:style-name="P2">Este selector requiere que el atributo exista y que su valor coincida con el patrón especificado.</text:p>
      <text:p text:style-name="P2"/>
      <text:p text:style-name="P2">D. Selecciona párrafos cuyo atributo name contiene la cadena "mi" en cualquier posición.</text:p>
      <text:p text:style-name="P2">Respuesta correcta(omitida)</text:p>
      <text:p text:style-name="P2"><text:soft-page-break/>El asterisco funciona como un comodín que busca la coincidencia de la subcadena dentro del valor total del atributo.</text:p>
      <text:p text:style-name="P2"/>
      <text:p text:style-name="P1">7. Si un elemento tiene un ancho de 200px, un padding de 10px en todos sus lados y un borde de 2px, ¿cuál es su ancho real ocupado según el Modelo de Caja Tradicional estándar?</text:p>
      <text:p text:style-name="P1"/>
      <text:p text:style-name="P2">A. 220px</text:p>
      <text:p text:style-name="P2">En este cálculo se omitió el valor de los bordes laterales en la suma total.</text:p>
      <text:p text:style-name="P2"/>
      <text:p text:style-name="P2">B. 200px</text:p>
      <text:p text:style-name="P2">Este sería el ancho si se usara box−sizing:border−box, pero el modelo tradicional estándar suma las propiedades externamente.</text:p>
      <text:p text:style-name="P2"/>
      <text:p text:style-name="P2">C. 224px</text:p>
      <text:p text:style-name="P2">Respuesta correcta(omitida)</text:p>
      <text:p text:style-name="P2">Se suma el ancho base (200px) más el padding izquierdo y derecho (10px+10px) más el borde izquierdo y derecho (2px+2px).</text:p>
      <text:p text:style-name="P2"/>
      <text:p text:style-name="P2">D. 212px</text:p>
      <text:p text:style-name="P2">Parece que solo se sumó un lado de los márgenes internos y el borde, ignorando que el elemento tiene dos laterales.</text:p>
      <text:p text:style-name="P2"/>
      <text:p text:style-name="P1">8. ¿Cuál es la función de la pseudo-clase :nth−child(even)?</text:p>
      <text:p text:style-name="P1"/>
      <text:p text:style-name="P2"><text:span text:style-name="T1">A</text:span>. Seleccionar el último elemento de una lista de hermanos.</text:p>
      <text:p text:style-name="P2">Esa función corresponde específicamente a la pseudo-clase :last−child.</text:p>
      <text:p text:style-name="P2"/>
      <text:p text:style-name="P2">B. Seleccionar todos los elementos que tienen un índice impar.</text:p>
      <text:p text:style-name="P2">Para los elementos con índice impar se utiliza la palabra clave 'odd'.</text:p>
      <text:p text:style-name="P2"/>
      <text:p text:style-name="P2">C. Seleccionar todos los elementos que tienen un índice par entre sus hermanos.</text:p>
      <text:p text:style-name="P2">Respuesta correcta(omitida)</text:p>
      <text:p text:style-name="P2">La palabra clave 'even' se traduce como par y permite aplicar estilos alternados en listas o grupos.</text:p>
      <text:p text:style-name="P2"/>
      <text:p text:style-name="P2">D. Seleccionar únicamente el segundo elemento hijo del documento.</text:p>
      <text:p text:style-name="P2">Para seleccionar solo el segundo hijo se usaría el índice numérico :nth−child(2).</text:p>
      <text:p text:style-name="P2"/>
      <text:p text:style-name="P1">9. ¿Para qué se utiliza la propiedad 'clear' con el valor 'both' en el Modelo de Caja Tradicional?</text:p>
      <text:p text:style-name="P1"/>
      <text:p text:style-name="P2">A. Para borrar el contenido de texto dentro de una caja de diseño.</text:p>
      <text:p text:style-name="P2">La propiedad clear no afecta al contenido textual, sino al flujo de posicionamiento de los elementos.</text:p>
      <text:p text:style-name="P2"/>
      <text:p text:style-name="P2">B. Para eliminar los márgenes y rellenos de todos los elementos del sitio.</text:p>
      <text:p text:style-name="P2">La eliminación de márgenes se suele hacer con el selector universal y las propiedades margin y padding.</text:p>
      <text:p text:style-name="P2"/>
      <text:p text:style-name="P2">C. Para centrar automáticamente un elemento block dentro de su padre.</text:p>
      <text:p text:style-name="P2">El centrado de bloques se logra usualmente con margin: auto, no con clear.</text:p>
      <text:p text:style-name="P2"><text:soft-page-break/></text:p>
      <text:p text:style-name="P2">D. Para restaurar el flujo normal del documento y posicionar un elemento debajo de las cajas flotantes.</text:p>
      <text:p text:style-name="P2">Respuesta correcta(omitida)</text:p>
      <text:p text:style-name="P2">Evita que un elemento se sitúe al lado de elementos con la propiedad 'float', forzándolo a una nueva línea.</text:p>
      <text:p text:style-name="P2"/>
      <text:p text:style-name="P1">10.¿Qué propiedad de CSS3 permite que el 'padding' y el 'border' se incluyan dentro del ancho total especificado de un elemento?</text:p>
      <text:p text:style-name="P1"/>
      <text:p text:style-name="P2">A. box-sizing</text:p>
      <text:p text:style-name="P2">Respuesta correcta(omitida)</text:p>
      <text:p text:style-name="P2">Al establecer esta propiedad como 'border-box', el navegador ajusta el contenido para mantener el tamaño total definido.</text:p>
      <text:p text:style-name="P2"/>
      <text:p text:style-name="P1">11. ¿Qué prefijo debe utilizarse específicamente para asegurar la compatibilidad de propiedades experimentales en navegadores Firefox?</text:p>
      <text:p text:style-name="P1"/>
      <text:p text:style-name="P2">A. -moz-</text:p>
      <text:p text:style-name="P2">Respuesta correcta(omitida)</text:p>
      <text:p text:style-name="P2">Es el prefijo derivado de Mozilla, la organización detrás de Firefox.</text:p>
      <text:p text:style-name="P2"/>
      <text:p text:style-name="P2">B. -ms-</text:p>
      <text:p text:style-name="P2">Este prefijo se utiliza para la compatibilidad con Internet Explorer y versiones de Edge antiguas.</text:p>
      <text:p text:style-name="P2"/>
      <text:p text:style-name="P2">C. -webkit-</text:p>
      <text:p text:style-name="P2">Este prefijo es utilizado por motores como Safari y Chrome.</text:p>
      <text:p text:style-name="P2"/>
      <text:p text:style-name="P2">D. -o-</text:p>
      <text:p text:style-name="P2">Este prefijo corresponde históricamente al navegador Opera.</text:p>
      <text:p text:style-name="P2"/>
      <text:p text:style-name="P1">12.¿Cuál es la diferencia fundamental entre 'margin' y 'padding'?</text:p>
      <text:p text:style-name="P1"/>
      <text:p text:style-name="P2">A. El margin es el espacio fuera del borde del elemento, y el padding es el espacio entre el contenido y el borde.</text:p>
      <text:p text:style-name="P2">Respuesta correcta(omitida)</text:p>
      <text:p text:style-name="P2">Margin separa al elemento de sus vecinos, mientras que padding separa el contenido del propio borde de la caja.</text:p>
      <text:p text:style-name="P2"/>
      <text:p text:style-name="P2">B. Padding define el grosor del borde y margin define el color de fondo.</text:p>
      <text:p text:style-name="P2">El grosor del borde se define con la propiedad border y el color de fondo con background-color.</text:p>
      <text:p text:style-name="P2"/>
      <text:p text:style-name="P2">C. El padding es el espacio exterior al borde, mientras que el margin es el espacio interior.</text:p>
      <text:p text:style-name="P2">Esta definición invierte los roles de ambas propiedades dentro del modelo de caja.</text:p>
      <text:p text:style-name="P2"/>
      <text:p text:style-name="P2">D. Margin solo se aplica a elementos inline y padding solo a elementos block.</text:p>
      <text:p text:style-name="P2">Ambas propiedades pueden aplicarse a ambos tipos de elementos, aunque su comportamiento visual varíe.</text:p>
      <text:p text:style-name="P2"/>
      <text:p text:style-name="P1"><text:soft-page-break/>13.¿Cómo se define una regla en CSS que afecte a todos los elementos que tengan la clase 'seccion'?</text:p>
      <text:p text:style-name="P1"/>
      <text:p text:style-name="P2">A. .seccion</text:p>
      <text:p text:style-name="P2">Respuesta correcta(omitida)</text:p>
      <text:p text:style-name="P2">El punto es el selector de clase en CSS, permitiendo identificar múltiples elementos con el mismo atributo class.</text:p>
      <text:p text:style-name="P2"/>
      <text:p text:style-name="P1">14. ¿Qué sucede si aplicamos 'text-align: center' al elemento &lt;body&gt; pero queremos que el contenido dentro de un &lt;div&gt; interno vuelva a estar alineado a la izquierda?</text:p>
      <text:p text:style-name="P1"/>
      <text:p text:style-name="P2">A. El texto se alineará automáticamente a la izquierda sin hacer nada más.</text:p>
      <text:p text:style-name="P2">La propiedad 'text-align' es hereditaria, por lo que los hijos mantendrán el centrado a menos que se cambie.</text:p>
      <text:p text:style-name="P2"/>
      <text:p text:style-name="P2">B. Debemos aplicar 'text-align: left' específicamente a ese &lt;div&gt; interno.</text:p>
      <text:p text:style-name="P2">Respuesta correcta(omitida)</text:p>
      <text:p text:style-name="P2">Al asignar una nueva regla al hijo, esta sobrescribe la herencia recibida del padre (&lt;body&gt;).</text:p>
      <text:p text:style-name="P2"/>
      <text:p text:style-name="P2">C. Debemos borrar la etiqueta &lt;body&gt; para que el estilo deje de aplicarse.</text:p>
      <text:p text:style-name="P2">La etiqueta body es esencial para la estructura HTML y no debe eliminarse para gestionar estilos.</text:p>
      <text:p text:style-name="P2"/>
      <text:p text:style-name="P2">D. No es posible cambiarlo porque el estilo de body es obligatorio para todos sus hijos.</text:p>
      <text:p text:style-name="P2">Los estilos CSS pueden ser sobrescritos por reglas más específicas aplicadas a los elementos hijos.</text:p>
      <text:p text:style-name="P2"/>
      <text:p text:style-name="P1">15. ¿Qué pseudo-clase se utiliza para referenciar un elemento solo si es el único hijo disponible de su padre?</text:p>
      <text:p text:style-name="P1"/>
      <text:p text:style-name="P2">A. :only-child</text:p>
      <text:p text:style-name="P2">Respuesta correcta(omitida)</text:p>
      <text:p text:style-name="P2">Esta pseudo-clase detecta si el elemento no tiene hermanos dentro de su contenedor padre.</text:p>
      <text:p text:style-name="P2"/>
      <text:p text:style-name="P1">16. En el contexto de menús de navegación, ¿qué permite el valor 'inline-block' en la propiedad 'display'?</text:p>
      <text:p text:style-name="P1"/>
      <text:p text:style-name="P2">A. Que el menú desaparezca de la pantalla para ser reemplazado por un icono.</text:p>
      <text:p text:style-name="P2">Para ocultar un elemento se utiliza el valor 'none' en la propiedad display.</text:p>
      <text:p text:style-name="P2"/>
      <text:p text:style-name="P2">B. Forzar a que cada opción del menú ocupe el 100% del ancho disponible.</text:p>
      <text:p text:style-name="P2">Ocupar el 100% es el comportamiento natural del valor 'block', no del 'inline-block'.</text:p>
      <text:p text:style-name="P2"/>
      <text:p text:style-name="P2">C. Que los elementos se comporten como bloques pero se posicionen uno al lado del otro sin saltos de línea.</text:p>
      <text:p text:style-name="P2">Respuesta correcta(omitida)</text:p>
      <text:p text:style-name="P2">Combina la capacidad de asignar dimensiones (ancho/alto) de los bloques con la alineación horizontal de los elementos en línea.</text:p>
      <text:p text:style-name="P2"/>
      <text:p text:style-name="P2">D. Que los elementos de la lista mantengan siempre el punto o viñeta por defecto.</text:p>
      <text:p text:style-name="P2"><text:soft-page-break/>Las viñetas se controlan con 'list-style' y no dependen directamente del tipo de display.</text:p>
      <text:p text:style-name="P2"/>
      <text:p text:style-name="P1">17. ¿Qué selector se utiliza para aplicar un estilo a todos los elementos del cuerpo del documento para establecer reglas básicas?</text:p>
      <text:p text:style-name="P1"/>
      <text:p text:style-name="P2">A. *</text:p>
      <text:p text:style-name="P2">Respuesta correcta(omitida)</text:p>
      <text:p text:style-name="P2">El asterisco es el selector universal que representa a cada uno de los elementos presentes en el DOM.</text:p>
      <text:p text:style-name="P2"/>
      <text:p text:style-name="P1">18. ¿Cuál es la función de la pseudo-clase :not(p)?</text:p>
      <text:p text:style-name="P1"/>
      <text:p text:style-name="P2">A. Aplicar el estilo solo a los elementos de párrafo.</text:p>
      <text:p text:style-name="P2">Eso se lograría simplemente usando el selector de etiqueta 'p'.</text:p>
      <text:p text:style-name="P2"/>
      <text:p text:style-name="P2">B. Aplicar el estilo a todos los elementos excepto a los párrafos.</text:p>
      <text:p text:style-name="P2">Respuesta correcta(omitida)</text:p>
      <text:p text:style-name="P2">Funciona como un filtro de negación, excluyendo de la regla a los elementos indicados entre paréntesis.</text:p>
      <text:p text:style-name="P2"/>
      <text:p text:style-name="P2">C. Eliminar todos los párrafos del código HTML.</text:p>
      <text:p text:style-name="P2">Las pseudo-clases afectan a la presentación visual, no tienen la capacidad de borrar código fuente.</text:p>
      <text:p text:style-name="P2"/>
      <text:p text:style-name="P2">D. Indicar al navegador que el elemento párrafo no existe en CSS3.</text:p>
      <text:p text:style-name="P2">El elemento párrafo sigue siendo fundamental y totalmente válido en CSS3.</text:p>
      <text:p text:style-name="P2"/>
      <text:p text:style-name="P3">19. ¿Cuál es el símbolo utilizado para el selector de hermanos generales en CSS3 (que no necesitan ser adyacentes)?</text:p>
      <text:p text:style-name="P3"/>
      <text:p text:style-name="P4">A. ~</text:p>
      <text:p text:style-name="P4">Respuesta correcta(omitida)</text:p>
      <text:p text:style-name="P4">La tilde o virgulilla selecciona todos los hermanos que aparecen después, sin importar si hay otros elementos entre ellos.</text:p>
      <text:p text:style-name="P4"/>
      <text:p text:style-name="P3">20. En HTML5, ¿por qué es recomendable declarar los nuevos elementos estructurales (como &lt;header&gt;) con 'display: block'?</text:p>
      <text:p text:style-name="P3"/>
      <text:p text:style-name="P4">A. Porque HTML5 prohíbe el uso de elementos inline en la cabecera.</text:p>
      <text:p text:style-name="P4">HTML5 permite ambos tipos de elementos; la declaración es por fines de diseño y compatibilidad.</text:p>
      <text:p text:style-name="P4"/>
      <text:p text:style-name="P4">B. Para que los navegadores antiguos que no los reconocen los traten como cajas de bloque y no como texto en línea.</text:p>
      <text:p text:style-name="P4">Respuesta correcta(omitida)</text:p>
      <text:p text:style-name="P4">Esto asegura que la estructura se mantenga consistente incluso en software que no soporta nativamente HTML5.</text:p>
      <text:p text:style-name="P4"/>
      <text:p text:style-name="P4">C. Para reducir automáticamente el tamaño de las imágenes dentro de la sección.</text:p>
      <text:p text:style-name="P4">El tamaño de las imágenes se controla con propiedades de ancho y alto específicas.</text:p>
      <text:p text:style-name="P4"/>
      <text:p text:style-name="P4">D. Para evitar que el usuario pueda copiar el texto contenido en ellos.</text:p>
      <text:p text:style-name="P4"><text:soft-page-break/>La propiedad display no tiene ninguna relación con las restricciones de copiado de texto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07:14:32.781996600</meta:creation-date>
    <dc:date>2026-04-20T08:28:58.641786200</dc:date>
    <meta:editing-duration>PT1H14M26S</meta:editing-duration>
    <meta:editing-cycles>4</meta:editing-cycles>
    <meta:generator>LibreOffice/25.8.5.1$Windows_X86_64 LibreOffice_project/cde5f182e321816108385dd3739c4295be919062</meta:generator>
    <meta:document-statistic meta:table-count="0" meta:image-count="0" meta:object-count="0" meta:page-count="7" meta:paragraph-count="165" meta:word-count="1936" meta:character-count="12046" meta:non-whitespace-character-count="10273"/>
  </office:meta>
</office:document-meta>
</file>